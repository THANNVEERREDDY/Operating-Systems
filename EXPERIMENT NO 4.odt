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4</text:p>
      <text:p text:style-name="P2">CODE</text:p>
      <text:p text:style-name="P3"/>
      <text:p text:style-name="P4">#include&lt;stdio.h&gt;</text:p>
      <text:p text:style-name="P5"/>
      <text:p text:style-name="P6">int main()</text:p>
      <text:p text:style-name="P7">{</text:p>
      <text:p text:style-name="P8"><text:s text:c="4"/>int bt[20],p[20],wt[20],tat[20];</text:p>
      <text:p text:style-name="P9"><text:s text:c="4"/>int n,i,j,temp;</text:p>
      <text:p text:style-name="P10"><text:s text:c="4"/>float awt=0,atat=0;</text:p>
      <text:p text:style-name="P11"/>
      <text:p text:style-name="P12"><text:s text:c="4"/>printf("Enter number of processes: ");</text:p>
      <text:p text:style-name="P13"><text:s text:c="4"/>scanf("%d",&amp;n);</text:p>
      <text:p text:style-name="P14"/>
      <text:p text:style-name="P15"><text:s text:c="4"/>for(i=0;i&lt;n;i++)</text:p>
      <text:p text:style-name="P16"><text:s text:c="4"/>{</text:p>
      <text:p text:style-name="P17"><text:s text:c="8"/>p[i]=i+1;</text:p>
      <text:p text:style-name="P18"><text:s text:c="8"/>printf("Burst Time of P%d: ",i+1);</text:p>
      <text:p text:style-name="P19"><text:s text:c="8"/>scanf("%d",&amp;bt[i]);</text:p>
      <text:p text:style-name="P20"><text:s text:c="4"/>}</text:p>
      <text:p text:style-name="P21"/>
      <text:p text:style-name="P22"><text:s text:c="4"/>for(i=0;i&lt;n;i++)</text:p>
      <text:p text:style-name="P23"><text:s text:c="4"/>{</text:p>
      <text:p text:style-name="P24"><text:s text:c="8"/>for(j=i+1;j&lt;n;j++)</text:p>
      <text:p text:style-name="P25"><text:s text:c="8"/>{</text:p>
      <text:p text:style-name="P26"><text:s text:c="12"/>if(bt[i]&gt;bt[j])</text:p>
      <text:soft-page-break/>
      <text:p text:style-name="P27"><text:s text:c="12"/>{</text:p>
      <text:p text:style-name="P28"><text:s text:c="16"/>temp=bt[i];</text:p>
      <text:p text:style-name="P29"><text:s text:c="16"/>bt[i]=bt[j];</text:p>
      <text:p text:style-name="P30"><text:s text:c="16"/>bt[j]=temp;</text:p>
      <text:p text:style-name="P31"/>
      <text:p text:style-name="P32"><text:s text:c="16"/>temp=p[i];</text:p>
      <text:p text:style-name="P33"><text:s text:c="16"/>p[i]=p[j];</text:p>
      <text:p text:style-name="P34"><text:s text:c="16"/>p[j]=temp;</text:p>
      <text:p text:style-name="P35"><text:s text:c="12"/>}</text:p>
      <text:p text:style-name="P36"><text:s text:c="8"/>}</text:p>
      <text:p text:style-name="P37"><text:s text:c="4"/>}</text:p>
      <text:p text:style-name="P38"/>
      <text:p text:style-name="P39"><text:s text:c="4"/>wt[0]=0;</text:p>
      <text:p text:style-name="P40"/>
      <text:p text:style-name="P41"><text:s text:c="4"/>for(i=1;i&lt;n;i++)</text:p>
      <text:p text:style-name="P42"><text:s text:c="8"/>wt[i]=wt[i-1]+bt[i-1];</text:p>
      <text:p text:style-name="P43"/>
      <text:p text:style-name="P44"><text:s text:c="4"/>for(i=0;i&lt;n;i++)</text:p>
      <text:p text:style-name="P45"><text:s text:c="4"/>{</text:p>
      <text:p text:style-name="P46"><text:s text:c="8"/>tat[i]=wt[i]+bt[i];</text:p>
      <text:p text:style-name="P47"><text:s text:c="8"/>awt+=wt[i];</text:p>
      <text:p text:style-name="P48"><text:s text:c="8"/>atat+=tat[i];</text:p>
      <text:p text:style-name="P49"><text:s text:c="4"/>}</text:p>
      <text:p text:style-name="P50"/>
      <text:p text:style-name="P51"><text:s text:c="4"/>printf("\nProcess\tBT\tWT\tTAT\n");</text:p>
      <text:p text:style-name="P52"/>
      <text:soft-page-break/>
      <text:p text:style-name="P53"><text:s text:c="4"/>for(i=0;i&lt;n;i++)</text:p>
      <text:p text:style-name="P54"><text:s text:c="4"/>{</text:p>
      <text:p text:style-name="P55"><text:s text:c="8"/>printf("P%d\t%d\t%d\t%d\n",p[i],bt[i],wt[i],tat[i]);</text:p>
      <text:p text:style-name="P56"><text:s text:c="4"/>}</text:p>
      <text:p text:style-name="P57"/>
      <text:p text:style-name="P58"><text:s text:c="4"/>printf("\nAverage Waiting Time = %.2f",awt/n);</text:p>
      <text:p text:style-name="P59"><text:s text:c="4"/>printf("\nAverage Turnaround Time = %.2f",atat/n);</text:p>
      <text:p text:style-name="P60"/>
      <text:p text:style-name="P61"><text:s text:c="4"/>return 0;</text:p>
      <text:p text:style-name="P62">}</text:p>
      <text:p text:style-name="P63"/>
      <text:p text:style-name="P64">OUTPUT:</text:p>
      <text:p text:style-name="Normal"><text:span text:style-name="T65"><draw:frame draw:style-name="a0" draw:name="Picture 1" text:anchor-type="as-char" svg:x="0in" svg:y="0in" svg:width="6.26806in" svg:height="2.43125in" style:rel-width="scale" style:rel-height="scale"><draw:image xlink:href="media/image1.png" xlink:type="simple" xlink:show="embed" xlink:actuate="onLoad"/><svg:title/><svg:desc/></draw:frame></text:span></text:p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.5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wek Reddy Lella</meta:initial-creator>
    <dc:creator>Rutwek Reddy Lella</dc:creator>
    <meta:creation-date>2026-07-14T05:44:00Z</meta:creation-date>
    <dc:date>2026-07-14T05:46:00Z</dc:date>
    <meta:template xlink:href="Normal" xlink:type="simple"/>
    <meta:editing-cycles>1</meta:editing-cycles>
    <meta:editing-duration>PT120S</meta:editing-duration>
    <meta:document-statistic meta:page-count="3" meta:paragraph-count="2" meta:word-count="159" meta:character-count="1064" meta:row-count="7" meta:non-whitespace-character-count="907"/>
  </office:meta>
</office:document-meta>
</file>