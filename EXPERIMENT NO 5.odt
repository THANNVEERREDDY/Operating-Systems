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P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7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74" style:parent-style-name="Normal" style:family="paragraph">
      <style:paragraph-properties fo:text-indent="0.5in"/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EXPERIMENT NO 5</text:p>
      <text:p text:style-name="P2">CODE</text:p>
      <text:p text:style-name="P3">#include &lt;stdio.h&gt;</text:p>
      <text:p text:style-name="P4"/>
      <text:p text:style-name="P5">int main()</text:p>
      <text:p text:style-name="P6">{</text:p>
      <text:p text:style-name="P7"><text:s text:c="4"/>int bt[20], pr[20], p[20];</text:p>
      <text:p text:style-name="P8"><text:s text:c="4"/>int wt[20], tat[20];</text:p>
      <text:p text:style-name="P9"><text:s text:c="4"/>int n, i, j, temp;</text:p>
      <text:p text:style-name="P10"><text:s text:c="4"/>float avgwt = 0, avgtat = 0;</text:p>
      <text:p text:style-name="P11"/>
      <text:p text:style-name="P12"><text:s text:c="4"/>printf("Enter number of processes: ");</text:p>
      <text:p text:style-name="P13"><text:s text:c="4"/>scanf("%d", &amp;n);</text:p>
      <text:p text:style-name="P14"/>
      <text:p text:style-name="P15"><text:s text:c="4"/>for(i = 0; i &lt; n; i++)</text:p>
      <text:p text:style-name="P16"><text:s text:c="4"/>{</text:p>
      <text:p text:style-name="P17"><text:s text:c="8"/>p[i] = i + 1;</text:p>
      <text:p text:style-name="P18"/>
      <text:p text:style-name="P19"><text:s text:c="8"/>printf("Enter Burst Time of P%d: ", i + 1);</text:p>
      <text:p text:style-name="P20"><text:s text:c="8"/>scanf("%d", &amp;bt[i]);</text:p>
      <text:p text:style-name="P21"/>
      <text:p text:style-name="P22"><text:s text:c="8"/>printf("Enter Priority of P%d: ", i + 1);</text:p>
      <text:p text:style-name="P23"><text:s text:c="8"/>scanf("%d", &amp;pr[i]);</text:p>
      <text:p text:style-name="P24"><text:s text:c="4"/>}</text:p>
      <text:p text:style-name="P25"/>
      <text:p text:style-name="P26"><text:s text:c="4"/>for(i = 0; i &lt; n - 1; i++)</text:p>
      <text:soft-page-break/>
      <text:p text:style-name="P27"><text:s text:c="4"/>{</text:p>
      <text:p text:style-name="P28"><text:s text:c="8"/>for(j = i + 1; j &lt; n; j++)</text:p>
      <text:p text:style-name="P29"><text:s text:c="8"/>{</text:p>
      <text:p text:style-name="P30"><text:s text:c="12"/>if(pr[i] &gt; pr[j])</text:p>
      <text:p text:style-name="P31"><text:s text:c="12"/>{</text:p>
      <text:p text:style-name="P32"><text:s text:c="16"/>temp = pr[i];</text:p>
      <text:p text:style-name="P33"><text:s text:c="16"/>pr[i] = pr[j];</text:p>
      <text:p text:style-name="P34"><text:s text:c="16"/>pr[j] = temp;</text:p>
      <text:p text:style-name="P35"/>
      <text:p text:style-name="P36"><text:s text:c="16"/>temp = bt[i];</text:p>
      <text:p text:style-name="P37"><text:s text:c="16"/>bt[i] = bt[j];</text:p>
      <text:p text:style-name="P38"><text:s text:c="16"/>bt[j] = temp;</text:p>
      <text:p text:style-name="P39"/>
      <text:p text:style-name="P40"><text:s text:c="16"/>temp = p[i];</text:p>
      <text:p text:style-name="P41"><text:s text:c="16"/>p[i] = p[j];</text:p>
      <text:p text:style-name="P42"><text:s text:c="16"/>p[j] = temp;</text:p>
      <text:p text:style-name="P43"><text:s text:c="12"/>}</text:p>
      <text:p text:style-name="P44"><text:s text:c="8"/>}</text:p>
      <text:p text:style-name="P45"><text:s text:c="4"/>}</text:p>
      <text:p text:style-name="P46"/>
      <text:p text:style-name="P47"><text:s text:c="4"/>wt[0] = 0;</text:p>
      <text:p text:style-name="P48"/>
      <text:p text:style-name="P49"><text:s text:c="4"/>for(i = 1; i &lt; n; i++)</text:p>
      <text:p text:style-name="P50"><text:s text:c="8"/>wt[i] = wt[i - 1] + bt[i - 1];</text:p>
      <text:p text:style-name="P51"/>
      <text:p text:style-name="P52"><text:s text:c="4"/>for(i = 0; i &lt; n; i++)</text:p>
      <text:soft-page-break/>
      <text:p text:style-name="P53"><text:s text:c="4"/>{</text:p>
      <text:p text:style-name="P54"><text:s text:c="8"/>tat[i] = wt[i] + bt[i];</text:p>
      <text:p text:style-name="P55"><text:s text:c="8"/>avgwt += wt[i];</text:p>
      <text:p text:style-name="P56"><text:s text:c="8"/>avgtat += tat[i];</text:p>
      <text:p text:style-name="P57"><text:s text:c="4"/>}</text:p>
      <text:p text:style-name="P58"/>
      <text:p text:style-name="P59"><text:s text:c="4"/>printf("\nProcess\tPriority\tBT\tWT\tTAT\n");</text:p>
      <text:p text:style-name="P60"/>
      <text:p text:style-name="P61"><text:s text:c="4"/>for(i = 0; i &lt; n; i++)</text:p>
      <text:p text:style-name="P62"><text:s text:c="4"/>{</text:p>
      <text:p text:style-name="P63"><text:s text:c="8"/>printf("P%d\t%d\t\t%d\t%d\t%d\n",</text:p>
      <text:p text:style-name="P64"><text:s text:c="15"/>p[i], pr[i], bt[i], wt[i], tat[i]);</text:p>
      <text:p text:style-name="P65"><text:s text:c="4"/>}</text:p>
      <text:p text:style-name="P66"/>
      <text:p text:style-name="P67"><text:s text:c="4"/>printf("\nAverage Waiting Time = %.2f", avgwt / n);</text:p>
      <text:p text:style-name="P68"><text:s text:c="4"/>printf("\nAverage Turnaround Time = %.2f\n", avgtat / n);</text:p>
      <text:p text:style-name="P69"/>
      <text:p text:style-name="P70"><text:s text:c="4"/>return 0;</text:p>
      <text:p text:style-name="P71">}</text:p>
      <text:p text:style-name="P72"/>
      <text:soft-page-break/>
      <text:p text:style-name="Normal"><text:span text:style-name="T73"><draw:frame draw:style-name="a0" draw:name="Picture 1" text:anchor-type="as-char" svg:x="0in" svg:y="0in" svg:width="6.26806in" svg:height="2.31458in" style:rel-width="scale" style:rel-height="scale"><draw:image xlink:href="media/image1.png" xlink:type="simple" xlink:show="embed" xlink:actuate="onLoad"/><svg:title/><svg:desc/></draw:frame></text:span></text:p>
      <text:p text:style-name="P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.5pt" fo:background-color="transparent" style:text-underline-type="none" style:text-underline-color="font-color" style:text-emphasize="none" fo:language="en" fo:country="IN" style:language-asian="en" style:country-asian="US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Mangal" fo:color="#2F5496" fo:font-size="20pt" style:font-size-asian="20pt" style:font-size-complex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Mangal" fo:color="#2F5496" fo:font-size="14pt" style:font-size-asian="14pt" style:font-size-complex="12.5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Mangal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Mangal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Mangal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Mangal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Mangal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Mangal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20pt" style:font-size-asian="20pt" style:font-size-complex="18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Heading3Char" style:display-name="Heading 3 Char" style:family="text" style:parent-style-name="DefaultParagraphFont">
      <style:text-properties style:font-name-asian="Times New Roman" style:font-name-complex="Mangal" fo:color="#2F5496" fo:font-size="14pt" style:font-size-asian="14pt" style:font-size-complex="12.5pt"/>
    </style:style>
    <style:style style:name="Heading4Char" style:display-name="Heading 4 Char" style:family="text" style:parent-style-name="DefaultParagraphFont">
      <style:text-properties style:font-name-asian="Times New Roman" style:font-name-complex="Mangal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Mangal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Mangal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Mangal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Mangal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Mangal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Mangal" fo:letter-spacing="-0.0069in" style:letter-kerning="true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Subtitle" style:display-name="Subtitle" style:family="paragraph" style:parent-style-name="Normal" style:next-style-name="Normal">
      <style:text-properties style:font-name-asian="Times New Roman" style:font-name-complex="Mangal" fo:color="#595959" fo:letter-spacing="0.0104in" fo:font-size="14pt" style:font-size-asian="14pt" style:font-size-complex="12.5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Mangal" fo:color="#595959" fo:letter-spacing="0.0104in" fo:font-size="14pt" style:font-size-asian="14pt" style:font-size-complex="12.5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utwek Reddy Lella</meta:initial-creator>
    <dc:creator>Rutwek Reddy Lella</dc:creator>
    <meta:creation-date>2026-07-14T05:46:00Z</meta:creation-date>
    <dc:date>2026-07-14T05:48:00Z</dc:date>
    <meta:template xlink:href="Normal" xlink:type="simple"/>
    <meta:editing-cycles>1</meta:editing-cycles>
    <meta:editing-duration>PT120S</meta:editing-duration>
    <meta:document-statistic meta:page-count="4" meta:paragraph-count="2" meta:word-count="210" meta:character-count="1410" meta:row-count="10" meta:non-whitespace-character-count="1202"/>
  </office:meta>
</office:document-meta>
</file>