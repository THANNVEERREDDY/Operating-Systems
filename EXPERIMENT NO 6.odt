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 6</text:p>
      <text:p text:style-name="P2">CODE</text:p>
      <text:p text:style-name="P3">#include &lt;stdio.h&gt;</text:p>
      <text:p text:style-name="P4"/>
      <text:p text:style-name="P5">int main()</text:p>
      <text:p text:style-name="P6">{</text:p>
      <text:p text:style-name="P7"><text:s text:c="4"/>int n, i, time = 0, completed = 0;</text:p>
      <text:p text:style-name="P8"><text:s text:c="4"/>int at[20], bt[20], rt[20], pr[20];</text:p>
      <text:p text:style-name="P9"><text:s text:c="4"/>int ct[20], tat[20], wt[20];</text:p>
      <text:p text:style-name="P10"><text:s text:c="4"/>int min, shortest;</text:p>
      <text:p text:style-name="P11"/>
      <text:p text:style-name="P12"><text:s text:c="4"/>float avgwt = 0, avgtat = 0;</text:p>
      <text:p text:style-name="P13"/>
      <text:p text:style-name="P14"><text:s text:c="4"/>printf("Enter number of processes: ");</text:p>
      <text:p text:style-name="P15"><text:s text:c="4"/>scanf("%d", &amp;n);</text:p>
      <text:p text:style-name="P16"/>
      <text:p text:style-name="P17"><text:s text:c="4"/>for(i = 0; i &lt; n; i++)</text:p>
      <text:p text:style-name="P18"><text:s text:c="4"/>{</text:p>
      <text:p text:style-name="P19"><text:s text:c="8"/>printf("\nProcess P%d\n", i + 1);</text:p>
      <text:p text:style-name="P20"/>
      <text:p text:style-name="P21"><text:s text:c="8"/>printf("Arrival Time : ");</text:p>
      <text:p text:style-name="P22"><text:s text:c="8"/>scanf("%d", &amp;at[i]);</text:p>
      <text:p text:style-name="P23"/>
      <text:p text:style-name="P24"><text:s text:c="8"/>printf("Burst Time : ");</text:p>
      <text:p text:style-name="P25"><text:s text:c="8"/>scanf("%d", &amp;bt[i]);</text:p>
      <text:p text:style-name="P26"/>
      <text:soft-page-break/>
      <text:p text:style-name="P27"><text:s text:c="8"/>printf("Priority : ");</text:p>
      <text:p text:style-name="P28"><text:s text:c="8"/>scanf("%d", &amp;pr[i]);</text:p>
      <text:p text:style-name="P29"/>
      <text:p text:style-name="P30"><text:s text:c="8"/>rt[i] = bt[i];</text:p>
      <text:p text:style-name="P31"><text:s text:c="4"/>}</text:p>
      <text:p text:style-name="P32"/>
      <text:p text:style-name="P33"><text:s text:c="4"/>while(completed != n)</text:p>
      <text:p text:style-name="P34"><text:s text:c="4"/>{</text:p>
      <text:p text:style-name="P35"><text:s text:c="8"/>shortest = -1;</text:p>
      <text:p text:style-name="P36"><text:s text:c="8"/>min = 9999;</text:p>
      <text:p text:style-name="P37"/>
      <text:p text:style-name="P38"><text:s text:c="8"/>for(i = 0; i &lt; n; i++)</text:p>
      <text:p text:style-name="P39"><text:s text:c="8"/>{</text:p>
      <text:p text:style-name="P40"><text:s text:c="12"/>if(at[i] &lt;= time &amp;&amp; rt[i] &gt; 0 &amp;&amp; pr[i] &lt; min)</text:p>
      <text:p text:style-name="P41"><text:s text:c="12"/>{</text:p>
      <text:p text:style-name="P42"><text:s text:c="16"/>min = pr[i];</text:p>
      <text:p text:style-name="P43"><text:s text:c="16"/>shortest = i;</text:p>
      <text:p text:style-name="P44"><text:s text:c="12"/>}</text:p>
      <text:p text:style-name="P45"><text:s text:c="8"/>}</text:p>
      <text:p text:style-name="P46"/>
      <text:p text:style-name="P47"><text:s text:c="8"/>if(shortest == -1)</text:p>
      <text:p text:style-name="P48"><text:s text:c="8"/>{</text:p>
      <text:p text:style-name="P49"><text:s text:c="12"/>time++;</text:p>
      <text:p text:style-name="P50"><text:s text:c="12"/>continue;</text:p>
      <text:p text:style-name="P51"><text:s text:c="8"/>}</text:p>
      <text:p text:style-name="P52"/>
      <text:soft-page-break/>
      <text:p text:style-name="P53"><text:s text:c="8"/>rt[shortest]--;</text:p>
      <text:p text:style-name="P54"><text:s text:c="8"/>time++;</text:p>
      <text:p text:style-name="P55"/>
      <text:p text:style-name="P56"><text:s text:c="8"/>if(rt[shortest] == 0)</text:p>
      <text:p text:style-name="P57"><text:s text:c="8"/>{</text:p>
      <text:p text:style-name="P58"><text:s text:c="12"/>completed++;</text:p>
      <text:p text:style-name="P59"/>
      <text:p text:style-name="P60"><text:s text:c="12"/>ct[shortest] = time;</text:p>
      <text:p text:style-name="P61"/>
      <text:p text:style-name="P62"><text:s text:c="12"/>tat[shortest] = ct[shortest] - at[shortest];</text:p>
      <text:p text:style-name="P63"/>
      <text:p text:style-name="P64"><text:s text:c="12"/>wt[shortest] = tat[shortest] - bt[shortest];</text:p>
      <text:p text:style-name="P65"/>
      <text:p text:style-name="P66"><text:s text:c="12"/>avgwt += wt[shortest];</text:p>
      <text:p text:style-name="P67"/>
      <text:p text:style-name="P68"><text:s text:c="12"/>avgtat += tat[shortest];</text:p>
      <text:p text:style-name="P69"><text:s text:c="8"/>}</text:p>
      <text:p text:style-name="P70"><text:s text:c="4"/>}</text:p>
      <text:p text:style-name="P71"/>
      <text:p text:style-name="P72"><text:s text:c="4"/>printf("\nProcess\tAT\tBT\tPR\tCT\tTAT\tWT\n");</text:p>
      <text:p text:style-name="P73"/>
      <text:p text:style-name="P74"><text:s text:c="4"/>for(i = 0; i &lt; n; i++)</text:p>
      <text:p text:style-name="P75"><text:s text:c="4"/>{</text:p>
      <text:p text:style-name="P76"><text:s text:c="8"/>printf("P%d\t%d\t%d\t%d\t%d\t%d\t%d\n",</text:p>
      <text:p text:style-name="P77"><text:s text:c="15"/>i + 1, at[i], bt[i], pr[i],</text:p>
      <text:p text:style-name="P78"><text:s text:c="15"/>ct[i], tat[i], wt[i]);</text:p>
      <text:soft-page-break/>
      <text:p text:style-name="P79"><text:s text:c="4"/>}</text:p>
      <text:p text:style-name="P80"/>
      <text:p text:style-name="P81"><text:s text:c="4"/>printf("\nAverage Waiting Time = %.2f", avgwt / n);</text:p>
      <text:p text:style-name="P82"/>
      <text:p text:style-name="P83"><text:s text:c="4"/>printf("\nAverage Turnaround Time = %.2f\n", avgtat / n);</text:p>
      <text:p text:style-name="P84"/>
      <text:p text:style-name="P85"><text:s text:c="4"/>return 0;</text:p>
      <text:p text:style-name="P86">}</text:p>
      <text:p text:style-name="P87"/>
      <text:p text:style-name="P88">OUTPUT:</text:p>
      <text:p text:style-name="Normal"><text:span text:style-name="T89"><draw:frame draw:style-name="a0" draw:name="Picture 1" text:anchor-type="as-char" svg:x="0in" svg:y="0in" svg:width="6.26806in" svg:height="2.31944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wek Reddy Lella</meta:initial-creator>
    <dc:creator>Rutwek Reddy Lella</dc:creator>
    <meta:creation-date>2026-07-14T05:48:00Z</meta:creation-date>
    <dc:date>2026-07-14T05:49:00Z</dc:date>
    <meta:template xlink:href="Normal" xlink:type="simple"/>
    <meta:editing-cycles>1</meta:editing-cycles>
    <meta:editing-duration>PT60S</meta:editing-duration>
    <meta:document-statistic meta:page-count="4" meta:paragraph-count="3" meta:word-count="248" meta:character-count="1660" meta:row-count="11" meta:non-whitespace-character-count="1415"/>
  </office:meta>
</office:document-meta>
</file>