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 7</text:p>
      <text:p text:style-name="P2">CODE#include &lt;stdio.h&gt;</text:p>
      <text:p text:style-name="P3"/>
      <text:p text:style-name="P4">int main() {</text:p>
      <text:p text:style-name="P5"><text:s text:c="4"/>int bt[20], wt[20], tat[20], p[20];</text:p>
      <text:p text:style-name="P6"><text:s text:c="4"/>int n, i, j, temp;</text:p>
      <text:p text:style-name="P7"><text:s text:c="4"/>float awt = 0, atat = 0;</text:p>
      <text:p text:style-name="P8"/>
      <text:p text:style-name="P9"><text:s text:c="4"/>printf("Enter number of processes: ");</text:p>
      <text:p text:style-name="P10"><text:s text:c="4"/>scanf("%d", &amp;n);</text:p>
      <text:p text:style-name="P11"/>
      <text:p text:style-name="P12"><text:s text:c="4"/>for(i = 0; i &lt; n; i++) {</text:p>
      <text:p text:style-name="P13"><text:s text:c="8"/>printf("Enter Burst Time for P%d: ", i + 1);</text:p>
      <text:p text:style-name="P14"><text:s text:c="8"/>scanf("%d", &amp;bt[i]);</text:p>
      <text:p text:style-name="P15"><text:s text:c="8"/>p[i] = i + 1;</text:p>
      <text:p text:style-name="P16"><text:s text:c="4"/>}</text:p>
      <text:p text:style-name="P17"/>
      <text:p text:style-name="P18"><text:s text:c="4"/>for(i = 0; i &lt; n - 1; i++) {</text:p>
      <text:p text:style-name="P19"><text:s text:c="8"/>for(j = i + 1; j &lt; n; j++) {</text:p>
      <text:p text:style-name="P20"><text:s text:c="12"/>if(bt[i] &gt; bt[j]) {</text:p>
      <text:p text:style-name="P21"><text:s text:c="16"/>temp = bt[i];</text:p>
      <text:p text:style-name="P22"><text:s text:c="16"/>bt[i] = bt[j];</text:p>
      <text:p text:style-name="P23"><text:s text:c="16"/>bt[j] = temp;</text:p>
      <text:p text:style-name="P24"/>
      <text:p text:style-name="P25"><text:s text:c="16"/>temp = p[i];</text:p>
      <text:p text:style-name="P26"><text:s text:c="16"/>p[i] = p[j];</text:p>
      <text:soft-page-break/>
      <text:p text:style-name="P27"><text:s text:c="16"/>p[j] = temp;</text:p>
      <text:p text:style-name="P28"><text:s text:c="12"/>}</text:p>
      <text:p text:style-name="P29"><text:s text:c="8"/>}</text:p>
      <text:p text:style-name="P30"><text:s text:c="4"/>}</text:p>
      <text:p text:style-name="P31"/>
      <text:p text:style-name="P32"><text:s text:c="4"/>wt[0] = 0;</text:p>
      <text:p text:style-name="P33"/>
      <text:p text:style-name="P34"><text:s text:c="4"/>for(i = 1; i &lt; n; i++)</text:p>
      <text:p text:style-name="P35"><text:s text:c="8"/>wt[i] = wt[i - 1] + bt[i - 1];</text:p>
      <text:p text:style-name="P36"/>
      <text:p text:style-name="P37"><text:s text:c="4"/>printf("\nProcess\tBT\tWT\tTAT\n");</text:p>
      <text:p text:style-name="P38"/>
      <text:p text:style-name="P39"><text:s text:c="4"/>for(i = 0; i &lt; n; i++) {</text:p>
      <text:p text:style-name="P40"><text:s text:c="8"/>tat[i] = wt[i] + bt[i];</text:p>
      <text:p text:style-name="P41"><text:s text:c="8"/>awt += wt[i];</text:p>
      <text:p text:style-name="P42"><text:s text:c="8"/>atat += tat[i];</text:p>
      <text:p text:style-name="P43"><text:s text:c="8"/>printf("P%d\t%d\t%d\t%d\n", p[i], bt[i], wt[i], tat[i]);</text:p>
      <text:p text:style-name="P44"><text:s text:c="4"/>}</text:p>
      <text:p text:style-name="P45"/>
      <text:p text:style-name="P46"><text:s text:c="4"/>printf("\nAverage Waiting Time = %.2f", awt / n);</text:p>
      <text:p text:style-name="P47"><text:s text:c="4"/>printf("\nAverage Turnaround Time = %.2f", atat / n);</text:p>
      <text:p text:style-name="P48"/>
      <text:p text:style-name="P49"><text:s text:c="4"/>return 0;</text:p>
      <text:p text:style-name="P50">}</text:p>
      <text:p text:style-name="P51"/>
      <text:p text:style-name="P52"/>
      <text:soft-page-break/>
      <text:p text:style-name="P53">OUTPUT:</text:p>
      <text:p text:style-name="Normal"><text:span text:style-name="T54"><draw:frame draw:style-name="a0" draw:name="Picture 1" text:anchor-type="as-char" svg:x="0in" svg:y="0in" svg:width="6.26806in" svg:height="1.712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wek Reddy Lella</meta:initial-creator>
    <dc:creator>Rutwek Reddy Lella</dc:creator>
    <meta:creation-date>2026-07-14T05:55:00Z</meta:creation-date>
    <dc:date>2026-07-14T05:56:00Z</dc:date>
    <meta:template xlink:href="Normal" xlink:type="simple"/>
    <meta:editing-cycles>1</meta:editing-cycles>
    <meta:editing-duration>PT60S</meta:editing-duration>
    <meta:document-statistic meta:page-count="3" meta:paragraph-count="2" meta:word-count="165" meta:character-count="1105" meta:row-count="7" meta:non-whitespace-character-count="942"/>
  </office:meta>
</office:document-meta>
</file>